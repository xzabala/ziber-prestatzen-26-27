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65000000C83F32208A.png" manifest:media-type="image/png"/>
  <manifest:file-entry manifest:full-path="Pictures/100000010000024F0000024F3374BE3D.png" manifest:media-type="image/png"/>
  <manifest:file-entry manifest:full-path="Pictures/100000010000049D0000021186ABE9CB.png" manifest:media-type="image/png"/>
  <manifest:file-entry manifest:full-path="Pictures/100000010000024F0000024F472C3B02.png" manifest:media-type="image/png"/>
  <manifest:file-entry manifest:full-path="Pictures/100000010000049D000001EC03AF8E9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Helvetica Neue" svg:font-family="'Helvetica Neu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rebuchet MS" svg:font-family="'Trebuchet MS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705a88" draw:textarea-vertical-align="top" draw:auto-grow-height="false" draw:fit-to-size="false" style:shrink-to-fit="false" fo:min-height="0cm" fo:min-width="0cm" fo:padding-top="0.339cm" fo:padding-bottom="0.339cm" fo:padding-left="0.339cm" fo:padding-right="0.339cm" fo:wrap-option="wrap" loext:decorative="false"/>
    </style:style>
    <style:style style:name="gr2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.339cm" fo:padding-bottom="0.339cm" fo:padding-left="0.339cm" fo:padding-right="0.339cm" fo:wrap-option="wrap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339cm" fo:padding-bottom="0.339cm" fo:padding-left="0.339cm" fo:padding-right="0.339cm" fo:wrap-option="wrap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solid" draw:fill-color="#705a88" draw:textarea-vertical-align="top" draw:auto-grow-height="false" draw:fit-to-size="false" style:shrink-to-fit="false" fo:min-height="37.563cm" fo:min-width="67.338cm" fo:padding-top="0.339cm" fo:padding-bottom="0.339cm" fo:padding-left="0.339cm" fo:padding-right="0.339cm" fo:wrap-option="wrap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5f_AND_5f_BODY-backgroundobjects">
      <style:graphic-properties draw:stroke="none" svg:stroke-width="0cm" draw:fill="none" draw:fill-color="#ffffff" draw:textarea-vertical-align="middle" draw:auto-grow-height="true" draw:fit-to-size="false" style:shrink-to-fit="false" fo:min-height="22.098cm" fo:padding-top="0.26cm" fo:padding-bottom="0.26cm" fo:padding-left="0.26cm" fo:padding-right="0.26cm" fo:wrap-option="wrap" loext:decorative="false"/>
      <style:paragraph-properties style:writing-mode="lr-tb"/>
    </style:style>
    <style:style style:name="pr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left" fo:text-indent="0cm" loext:tab-stop-distance="0cm" style:writing-mode="lr-tb">
        <style:tab-stops>
          <style:tab-stop style:position="0cm"/>
        </style:tab-stops>
      </style:paragraph-properties>
      <style:text-properties fo:font-size="72pt" style:font-size-asian="14pt" style:font-size-complex="14pt"/>
    </style:style>
    <style:style style:name="P2" style:family="paragraph">
      <loext:graphic-properties draw:fill="none" draw:fill-color="#ffffff"/>
      <style:paragraph-properties fo:text-align="left" style:font-independent-line-spacing="true"/>
      <style:text-properties fo:font-size="72pt" style:font-size-asian="14pt" style:font-size-complex="14pt"/>
    </style:style>
    <style:style style:name="P3" style:family="paragraph">
      <loext:graphic-properties draw:fill="solid" draw:fill-color="#705a88"/>
      <style:paragraph-properties fo:text-align="lef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70%" fo:text-align="right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left" style:font-independent-line-spacing="true"/>
      <style:text-properties fo:font-size="14pt"/>
    </style:style>
    <style:style style:name="P6" style:family="paragraph">
      <loext:graphic-properties draw:fill="none"/>
      <style:paragraph-properties fo:text-align="left"/>
      <style:text-properties fo:font-size="18pt"/>
    </style:style>
    <style:style style:name="P7" style:family="paragraph">
      <style:paragraph-properties fo:margin-left="0cm" fo:margin-right="0cm" fo:margin-top="0cm" fo:margin-bottom="0cm" fo:line-height="120%" fo:text-align="right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.27cm" fo:margin-right="0cm" fo:margin-top="0.388cm" fo:margin-bottom="0cm" fo:line-height="100%" fo:text-align="left" fo:text-indent="-0.634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style:font-name="Trebuchet MS" fo:font-size="32pt" fo:letter-spacing="normal" fo:font-style="normal" style:text-underline-style="none" fo:font-weight="normal" style:font-name-asian="Trebuchet MS" style:font-size-asian="32pt" style:font-style-asian="normal" style:font-weight-asian="normal" style:font-name-complex="Trebuchet MS" style:font-size-complex="32pt" style:font-style-complex="normal" style:font-weight-complex="normal"/>
    </style:style>
    <style:style style:name="P9" style:family="paragraph">
      <style:paragraph-properties fo:text-align="center"/>
    </style:style>
    <style:style style:name="T1" style:family="text">
      <style:text-properties fo:font-variant="normal" fo:text-transform="none" fo:color="#bebebe" loext:opacity="100%" style:text-line-through-style="none" style:text-line-through-type="none" style:text-position="0% 100%" style:font-name="Arial" fo:font-size="72pt" fo:letter-spacing="normal" fo:font-style="normal" style:text-underline-style="none" fo:font-weight="normal" style:font-name-asian="Ari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0pt" fo:letter-spacing="normal" fo:font-style="normal" style:text-underline-style="none" fo:font-weight="normal" style:font-name-asian="Arial" style:font-size-asian="180pt" style:font-style-asian="normal" style:font-weight-asian="normal" style:font-name-complex="Arial" style:font-size-complex="18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64pt" fo:letter-spacing="normal" fo:font-style="normal" style:text-underline-style="none" fo:font-weight="normal" style:font-name-asian="Arial" style:font-size-asian="64pt" style:font-style-asian="normal" style:font-weight-asian="normal" style:font-name-complex="Arial" style:font-size-complex="6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frame draw:name="Google Shape;19;p1" presentation:style-name="pr1" draw:text-style-name="P2" draw:layer="layout" svg:width="1.967cm" svg:height="22.618cm" svg:x="62.834cm" svg:y="-7.14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20;p1" draw:style-name="gr1" draw:text-style-name="P3" draw:layer="layout" svg:width="68.015cm" svg:height="38.24cm" svg:x="-0.141cm" svg:y="-0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;p1" draw:style-name="gr2" draw:text-style-name="P5" draw:layer="layout" svg:width="30.211cm" svg:height="11.345cm" svg:x="33.32cm" svg:y="15.188cm">
          <text:p text:style-name="P4"><text:span text:style-name="T2">OpenPLC</text:span></text:p>
          <text:p text:style-name="P4"><text:span text:style-name="T2">probatz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;p1" draw:style-name="gr3" draw:text-style-name="P6" draw:layer="layout" svg:width="18.607cm" svg:height="8.334cm" svg:x="36.505cm" svg:y="28.593cm">
          <draw:image xlink:href="Pictures/100000010000049D0000021186ABE9CB.png" xlink:type="simple" xlink:show="embed" xlink:actuate="onLoad" draw:mime-type="image/png">
            <text:p/>
          </draw:image>
        </draw:frame>
        <draw:frame draw:name="Google Shape;23;p1" draw:style-name="gr3" draw:text-style-name="P6" draw:layer="layout" svg:width="7.248cm" svg:height="7.248cm" svg:x="56.227cm" svg:y="29.136cm">
          <draw:image xlink:href="Pictures/100000010000024F0000024F3374BE3D.png" xlink:type="simple" xlink:show="embed" xlink:actuate="onLoad" draw:mime-type="image/png">
            <text:p/>
          </draw:image>
        </draw:frame>
        <draw:custom-shape draw:name="Google Shape;24;p1" draw:style-name="gr4" draw:text-style-name="P5" draw:layer="layout" svg:width="28.147cm" svg:height="3.931cm" svg:x="35.385cm" svg:y="25.084cm"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;p1:notes" presentation:style-name="pr2" draw:text-style-name="P8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7;p1:notes" draw:style-name="gr5" draw:layer="layout" svg:width="12.699cm" svg:height="9.524cm" svg:x="3.175cm" svg:y="1.905cm" draw:page-number="1" presentation:class="page"/>
        </presentation:notes>
      </draw:page>
      <draw:page draw:name="page2" draw:style-name="dp1" draw:master-page-name="TITLE_5f_AND_5f_BODY" presentation:presentation-page-layout-name="AL1T1">
        <draw:frame draw:name="Google Shape;19;p 1" presentation:style-name="pr1" draw:text-style-name="P2" draw:layer="layout" svg:width="1.967cm" svg:height="22.618cm" svg:x="62.834cm" svg:y="-7.14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20;p 1" draw:style-name="gr6" draw:text-style-name="P3" draw:layer="layout" svg:width="68.015cm" svg:height="38.24cm" svg:x="-0.141cm" svg:y="-0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15.536cm" svg:height="8.703cm" svg:x="24.388cm" svg:y="28.136cm">
          <draw:image xlink:href="Pictures/1000000100000165000000C83F32208A.png" xlink:type="simple" xlink:show="embed" xlink:actuate="onLoad" draw:mime-type="image/png">
            <text:p/>
          </draw:image>
        </draw:frame>
        <draw:frame draw:name="Google Shape;22;p 1" draw:style-name="gr3" draw:text-style-name="P6" draw:layer="layout" svg:width="18.607cm" svg:height="8.334cm" svg:x="22.853cm" svg:y="14.146cm">
          <draw:image xlink:href="Pictures/100000010000049D0000021186ABE9CB.png" xlink:type="simple" xlink:show="embed" xlink:actuate="onLoad" draw:mime-type="image/png">
            <text:p/>
          </draw:image>
        </draw:frame>
        <presentation:notes draw:style-name="dp1">
          <draw:frame draw:name="Google Shape;16;p1:notes 1" presentation:style-name="pr3" draw:text-style-name="P8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7;p1:notes 1" draw:style-name="gr5" draw:layer="layout" svg:width="12.699cm" svg:height="9.524cm" svg:x="3.175cm" svg:y="1.905cm" draw:page-number="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Helvetica Neue" svg:font-family="'Helvetica Neu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rebuchet MS" svg:font-family="'Trebuchet M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176cm" draw:distance="0.52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lef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lef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lef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141cm" svg:stroke-color="#705a88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26cm" fo:padding-bottom="0.26cm" fo:padding-left="0.26cm" fo:padding-right="0.26cm" fo:wrap-option="wrap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true" draw:fit-to-size="false" style:shrink-to-fit="false" fo:min-height="22.098cm" fo:padding-top="0.26cm" fo:padding-bottom="0.26cm" fo:padding-left="0.26cm" fo:padding-right="0.26cm" fo:wrap-option="wrap" loext:decorative="false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lef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left" fo:text-indent="0cm" loext:tab-stop-distance="0cm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lef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left" fo:text-indent="0cm" loext:tab-stop-distance="0cm" style:writing-mode="lr-tb">
        <style:tab-stops>
          <style:tab-stop style:position="0cm"/>
        </style:tab-stops>
      </style:paragraph-properties>
      <style:text-properties fo:font-size="72pt" style:font-size-asian="14pt" style:font-size-complex="14pt"/>
    </style:style>
    <style:style style:name="MP9" style:family="paragraph">
      <loext:graphic-properties draw:fill="none" draw:fill-color="#ffffff"/>
      <style:paragraph-properties fo:text-align="left" style:font-independent-line-spacing="true"/>
      <style:text-properties fo:font-size="7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ddddd" loext:opacity="100%" style:text-line-through-style="none" style:text-line-through-type="none" style:text-position="0% 100%" style:font-name="Arial" fo:font-size="96pt" fo:letter-spacing="normal" fo:font-style="normal" style:text-underline-style="none" fo:font-weight="normal" style:font-name-asian="Arial" style:font-size-asian="96pt" style:font-style-asian="normal" style:font-weight-asian="normal" style:font-name-complex="Arial" style:font-size-complex="96pt" style:font-style-complex="normal" style:font-weight-complex="normal"/>
    </style:style>
    <style:style style:name="MT3" style:family="text">
      <style:text-properties fo:font-variant="normal" fo:text-transform="none" fo:color="#bebebe" loext:opacity="100%" style:text-line-through-style="none" style:text-line-through-type="none" style:text-position="0% 100%" style:font-name="Arial" fo:font-size="72pt" fo:letter-spacing="normal" fo:font-style="normal" style:text-underline-style="none" fo:font-weight="normal" style:font-name-asian="Arial" style:font-size-asian="72pt" style:font-style-asian="normal" style:font-weight-asian="normal" style:font-name-complex="Arial" style:font-size-complex="7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6;p9" draw:style-name="Mgr3" draw:text-style-name="MP5" draw:layer="backgroundobjects" svg:width="43.922cm" svg:height="0.001cm" svg:x="3.124cm" svg:y="4.163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7;p9" draw:style-name="Mgr4" draw:text-style-name="MP7" draw:layer="backgroundobjects" svg:width="2.375cm" svg:height="4.586cm" svg:x="61.716cm" svg:y="1.638cm">
        <text:p text:style-name="MP6"><text:span text:style-name="MT2">|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;p9" draw:style-name="Mgr5" draw:text-style-name="MP5" draw:layer="backgroundobjects" svg:width="10.38cm" svg:height="4.323cm" svg:x="47.116cm" svg:y="1.698cm">
        <draw:image xlink:href="Pictures/100000010000049D000001EC03AF8E93.png" xlink:type="simple" xlink:show="embed" xlink:actuate="onLoad" draw:mime-type="image/png">
          <text:p/>
        </draw:image>
      </draw:frame>
      <draw:frame draw:name="Google Shape;9;p9" draw:style-name="Mgr5" draw:text-style-name="MP5" draw:layer="backgroundobjects" svg:width="3.792cm" svg:height="3.792cm" svg:x="57.567cm" svg:y="1.999cm">
        <draw:image xlink:href="Pictures/100000010000024F0000024F472C3B02.png" xlink:type="simple" xlink:show="embed" xlink:actuate="onLoad" draw:mime-type="image/png">
          <text:p/>
        </draw:image>
      </draw:frame>
      <draw:frame draw:name="Google Shape;14;p10" presentation:style-name="Mpr1" draw:text-style-name="MP9" draw:layer="backgroundobjects" svg:width="3.38cm" svg:height="22.618cm" svg:x="62.834cm" svg:y="-7.146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5f_AND_5f_BODY-title" draw:layer="backgroundobjects" svg:width="60.958cm" svg:height="6.361cm" svg:x="3.386cm" svg:y="1.52cm" presentation:class="title" presentation:placeholder="true">
        <draw:text-box/>
      </draw:frame>
      <draw:frame presentation:style-name="TITLE_5f_AND_5f_BODY-outline1" draw:layer="backgroundobjects" svg:width="60.958cm" svg:height="22.097cm" svg:x="3.386cm" svg:y="8.91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Nerea Etxaniz</meta:initial-creator>
    <meta:generator>LibreOffice/26.2.4.2$Linux_X86_64 LibreOffice_project/3346a99e6b841765b75a9b29714a5b95c6761ce3</meta:generator>
    <meta:print-date>2026-07-14T09:47:10.812253215</meta:print-date>
    <meta:printed-by>PDF files</meta:printed-by>
    <dc:date>2026-07-14T10:04:50.931011543</dc:date>
    <meta:editing-duration>PT13M38S</meta:editing-duration>
    <meta:editing-cycles>2</meta:editing-cycles>
    <meta:document-statistic meta:object-count="37"/>
  </office:meta>
</office:document-meta>
</file>